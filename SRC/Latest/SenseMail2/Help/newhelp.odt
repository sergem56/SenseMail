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nseMail – secure email client</text:p>
      <text:p text:style-name="Standard"/>
      <text:p text:style-name="Standard">SenseMail is an application that can connect to your favourite email service provider and protect your communications.</text:p>
      <text:p text:style-name="Standard"/>
      <text:p text:style-name="Standard">First of all, the protection is the state-of-the-art combination of compression, encryption and signing - <text:s/>the industry standard AES-256 algorithm is for encryption, gzip is for compression, HMAC and AONT are for signing and verification.</text:p>
      <text:p text:style-name="Standard"/>
      <text:p text:style-name="Standard">Secondly, the encryption key is derived from the initial data with PBKDF-SHA512. The number of rounds randomly varies from nearly 300K to almost 800K to be sure that it's large enough to make brute-forcing infeasible. </text:p>
      <text:p text:style-name="Standard"/>
      <text:p text:style-name="Standard">Last but not least is the way to obtain the initial data for the encryption key. There are 3 possibilities:</text:p>
      <text:list xml:id="list8982194436073267883" text:style-name="L1">
        <text:list-item>
          <text:p text:style-name="P1">A password. The weakest options, which, however, has several obvious advantages – effortless communication and extreme flexibility. There are plenty of ways to safely tell a password to your counterpart. You can set a different password to every message, if you wish.</text:p>
        </text:list-item>
        <text:list-item>
          <text:p text:style-name="P1">A fixed key. The strong option. A full 256-bit key which is additionally mutated to be different for every message sent. Generate a fixed certificate on one device and scan a QR-code by the other.</text:p>
        </text:list-item>
        <text:list-item>
          <text:p text:style-name="P1">A One-Time Certificate. The strongest option. A full 256-bit key that is used only ones. Moreover, a key has an expiration time. The drawback is that to exchange the OTC you require to collect two devices together, no way to do it remotely.</text:p>
        </text:list-item>
      </text:list>
      <text:p text:style-name="Standard"/>
      <text:p text:style-name="Standard">Other features</text:p>
      <text:list xml:id="list566436095748108977" text:style-name="L2">
        <text:list-item>
          <text:p text:style-name="P2">No mail messages are stores on the device</text:p>
        </text:list-item>
        <text:list-item>
          <text:p text:style-name="P2">No complains that a password is incorrect – every password logs you into a working environment</text:p>
        </text:list-item>
        <text:list-item>
          <text:p text:style-name="P2">Multiple email accounts with a combined inbox</text:p>
        </text:list-item>
        <text:list-item>
          <text:p text:style-name="P2">Local encrypted storage for address book, gallery and notes</text:p>
        </text:list-item>
        <text:list-item>
          <text:p text:style-name="P2">No insecure connections. No TLS/SSL = no connection</text:p>
        </text:list-item>
        <text:list-item>
          <text:p text:style-name="P2">Although message subject is encrypted it is insecure, do not put sensitive information there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 </meta:initial-creator>
    <meta:creation-date>2019-03-13T10:05:45</meta:creation-date>
    <dc:date>2019-03-13T11:05:43</dc:date>
    <dc:creator>Serge </dc:creator>
    <meta:editing-duration>PT42M12S</meta:editing-duration>
    <meta:editing-cycles>8</meta:editing-cycles>
    <meta:generator>OpenOffice/4.1.6$Unix OpenOffice.org_project/416m1$Build-9790</meta:generator>
    <meta:document-statistic meta:table-count="0" meta:image-count="0" meta:object-count="0" meta:page-count="1" meta:paragraph-count="15" meta:word-count="305" meta:character-count="1823"/>
  </office:meta>
</office:document-meta>
</file>